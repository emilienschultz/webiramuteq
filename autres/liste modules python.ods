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95854166666667cm" style:use-optimal-column-width="true"/>
    </style:style>
    <style:style style:name="co2" style:family="table-column">
      <style:table-column-properties fo:break-before="auto" style:column-width="7.9375cm" style:use-optimal-column-width="true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23.997708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p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dec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lections</text:p>
          </table:table-cell>
          <table:table-cell office:value-type="string" table:style-name="ce1">
            <text:p>from collections import MutableMapp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p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v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dec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ti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stutils</text:p>
          </table:table-cell>
          <table:table-cell office:value-type="string" table:style-name="ce1">
            <text:p>import distutils.c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ttex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lo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ml.ent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ml.pars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tert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g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ut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r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pa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tf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d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uptoo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l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ut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k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qlite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ubpro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mpfi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raceba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rlli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u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rning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bbrows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from wx.lib import she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from wx.lib.agw.fmresources import *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ad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gr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lib.agw.au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lib.agw.customtreectr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lib.agw.hyper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lib.agw.labelboo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lib.coloursele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lib.dialo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lib.filebrowsebutt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lib.mixins.listctr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x</text:p>
          </table:table-cell>
          <table:table-cell office:value-type="string" table:style-name="ce1">
            <text:p>import wx.lib.sized_contro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l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xml</text:p>
          </table:table-cell>
          <table:table-cell office:value-type="string" table:style-name="ce1">
            <text:p>import xml.dom.minid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ml</text:p>
          </table:table-cell>
          <table:table-cell office:value-type="string" table:style-name="ce1">
            <text:p>import xml.parsers.exp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ml</text:p>
          </table:table-cell>
          <table:table-cell office:value-type="string" table:style-name="ce1">
            <text:p>import xml.sa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pfile</text:p>
          </table:table-cell>
          <table:table-cell table:number-columns-repeated="16383" table:style-name="ce1"/>
        </table:table-row>
        <table:table-row table:number-rows-repeated="1048514" table:style-name="ro1">
          <table:table-cell table:number-columns-repeated="16384"/>
        </table:table-row>
      </table:table>
      <table:table table:name="Feui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_thread</text:p>
          </table:table-cell>
          <table:table-cell office:value-type="string" table:style-name="ce1">
            <text:p>import _thre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e_merge</text:p>
          </table:table-cell>
          <table:table-cell office:value-type="string" table:style-name="ce1">
            <text:p>from analyse_merge import AnalyseMer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ematrix</text:p>
          </table:table-cell>
          <table:table-cell office:value-type="string" table:style-name="ce1">
            <text:p>from analysematrix import AnalyseMatri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etxt</text:p>
          </table:table-cell>
          <table:table-cell office:value-type="string" table:style-name="ce1">
            <text:p>from analysetxt import AnalyseT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ckinstall</text:p>
          </table:table-cell>
          <table:table-cell office:value-type="string" table:style-name="ce1">
            <text:p>from checkinstall import CreateIraDirectory, CheckRPath, FindRPAthWin32, FindRPathNix, CheckRPackages, IsNew, UpgradeConf, CopyConf, RLibsAreInstall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ckversion</text:p>
          </table:table-cell>
          <table:table-cell office:value-type="string" table:style-name="ce1">
            <text:p>from checkversion import NewVer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hdTxtPathOut, Path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hdTxtPathOut, StatTxtPathOut, Path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onstructConfigPa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onstructConfigPath, ConstructDicoPa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onstructConfigPath, ConstructDicoPath, ConstructGlobalPath, Path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onstructPathOut, ChdTxtPathOut, ConstructAfcUciPath, ffr, PathOu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onstructPathOut, ChdTxtPathOut, FFF, ffr, PathOut, StatTxtPathOut, simipa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onstructPathOut, ConstructAfcUciPa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onstructPathOut, ConstructAfcUciPath, ChdTxtPath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onstructPathOut, ff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onstructPathOut, simipath, ffr, PathOu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ConstructPathOut, StatTxtPathOut, PathOut, ff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ff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ffr, ConstructAfcmPath, ConstructPath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ffr, ConstructPathOut,ChdTxtPath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ffr, F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ffr, FFF, ConstructPath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ffr, Path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ffr, simipa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Path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string" table:style-name="ce1">
            <text:p>from chemins import RscriptsPath, ConstructConfigPath, ConstructDicoPath, ConstructGlobalPath, Path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rs</text:p>
          </table:table-cell>
          <table:table-cell office:value-type="string" table:style-name="ce1">
            <text:p>from colors import colo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igparser</text:p>
          </table:table-cell>
          <table:table-cell office:value-type="string" table:style-name="ce1">
            <text:p>from configparser import *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igparser</text:p>
          </table:table-cell>
          <table:table-cell office:value-type="string" table:style-name="ce1">
            <text:p>from configparser import ConfigPars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igparser</text:p>
          </table:table-cell>
          <table:table-cell office:value-type="string" table:style-name="ce1">
            <text:p>from configparser import ConfigParser, RawConfigPars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igparser</text:p>
          </table:table-cell>
          <table:table-cell office:value-type="string" table:style-name="ce1">
            <text:p>from configparser import RawConfigPars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igparser_helpers</text:p>
          </table:table-cell>
          <table:table-cell office:value-type="string" table:style-name="ce1">
            <text:p>from configparser_helpers import _ChainM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us</text:p>
          </table:table-cell>
          <table:table-cell office:value-type="string" table:style-name="ce1">
            <text:p>from corpus import Builder, SubBuilder, MergeClust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us</text:p>
          </table:table-cell>
          <table:table-cell office:value-type="string" table:style-name="ce1">
            <text:p>from corpus import Corpus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corpus</text:p>
          </table:table-cell>
          <table:table-cell office:value-type="string" table:style-name="ce1">
            <text:p>from corpus import Corpus, copycorp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ChiDialog, PrefC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CorpusPref, SubTextFromMetaDial, MergeClusterFr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ExtractDi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FileOptionDialog, SelectColDial, OptLexi, PrefSimpleF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FreqDi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MergeDi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message, BarFr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OptLex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OptLexi #, StatDialog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PrefDi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PrefGraph, PrefExport, PrefSimpleFile, PrefDendro, SimpleDialog, ImageView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PrefQuestAl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PrefQuestAlc, ClusterNbDi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PrefSegProf, PrefProfTyp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PrefSimpleFile, PrefExport, SearchCorpus, translate_dialog, PrefUCECara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PrefUCECarac, SearchDial, message, BarFrame, ChronoFr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ProtoD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SearchD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SearchDial, mess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SearchDial, message, BarGraphDialog, BarFr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SelectColDial, FreqDi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StatDi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og</text:p>
          </table:table-cell>
          <table:table-cell office:value-type="string" table:style-name="ce1">
            <text:p>from dialog import StatDialog, PrefWordClou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BugRepo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BugReport, PlaySound, History, progressb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CreateIraFile, print_liste, exec_rcode, check_Rresu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decoupercharact, ReadDicoAsDico, DoConf, ReadLexique, progressb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doconco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DoCon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DoConf, exec_rcode, translation_languag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DoConf, GetTxtProfile, TGen, BugReport, open_folder, translateprofile, ReadProfileAsDico, write_translation_profile, progressbar, doconco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DoConf, print_liste, T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DoConf, read_chd, ReadProfileAs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DoConf, ReadDicoAs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exec_rcode</text:p>
          </table:table-cell>
          <table:table-cell table:number-columns-repeated="16382"/>
        </table:table-row>
        <table:table-row table:number-rows-repeated="8"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exec_rcode, check_Rresu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exec_rcode, check_Rresult, DoConf, progressb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exec_rcode, check_Rresult, DoConf, ReadDicoAsDico, progressb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exec_rcode, check_Rresult, progressb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exec_rcode, check_Rresult, ReadProfileAsDico, Read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exec_rcode, doconco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exec_rcode, exec_RCM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exec_rcode, progressbar, check_Rresult, CreateIraFile, print_liste, treat_var_mod, write_tab, DoConf, T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indices_simi, progressbar, treat_var_mod, read_list_file, print_liste, DoConf, exec_rcode, check_Rresu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print_liste, exec_rcode, CreateIraFile, progressbar, check_Rresult, BugDi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print_liste, exec_rcode, read_list_file, check_Rresult, indices_simi, treat_var_mod, normpath_win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progressbar, treat_var_mod, doconco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ReadList, progressbar, exec_rcode, check_Rresu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ReadProfileAsDico, GetTxtProfile, read_list_file, ReadList, exec_rcode, print_liste, BugReport, DoConf,\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sortedby, CreateIraFile, print_liste, exec_rcode, check_Rresu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sortedby, DoCon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sortedby, progressbar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sortedby, progressbar, exec_rcode, check_Rresu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from functions import treat_var_mod, print_liste, exec_rcode, check_Rresult, DoConf, read_list_file, indices_si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ph_to_json</text:p>
          </table:table-cell>
          <table:table-cell office:value-type="string" table:style-name="ce1">
            <text:p>from graph_to_json import GraphToJs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funct</text:p>
          </table:table-cell>
          <table:table-cell office:value-type="string" table:style-name="ce1">
            <text:p>from guifunct import *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funct</text:p>
          </table:table-cell>
          <table:table-cell office:value-type="string" table:style-name="ce1">
            <text:p>from guifunct import getPage, getCorpus, SelectColum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funct</text:p>
          </table:table-cell>
          <table:table-cell office:value-type="string" table:style-name="ce1">
            <text:p>from guifunct import PrefSi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funct</text:p>
          </table:table-cell>
          <table:table-cell office:value-type="string" table:style-name="ce1">
            <text:p>from guifunct import SelectColumn, PrepSimi, PrefSimi, redosi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funct</text:p>
          </table:table-cell>
          <table:table-cell office:value-type="string" table:style-name="ce1">
            <text:p>from guifunct import TGenFr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param3d</text:p>
          </table:table-cell>
          <table:table-cell office:value-type="string" table:style-name="ce1">
            <text:p>from guiparam3d import param3d, simi3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ML</text:p>
          </table:table-cell>
          <table:table-cell office:value-type="string" table:style-name="ce1">
            <text:p>import 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ort_txm</text:p>
          </table:table-cell>
          <table:table-cell office:value-type="string" table:style-name="ce1">
            <text:p>from import_txm import TXM2I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yFrame</text:p>
          </table:table-cell>
          <table:table-cell office:value-type="string" table:style-name="ce1">
            <text:p>from KeyFrame import AlcOptFr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gue</text:p>
          </table:table-cell>
          <table:table-cell office:value-type="string" table:style-name="ce1">
            <text:p>import lan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yout</text:p>
          </table:table-cell>
          <table:table-cell office:value-type="string" table:style-name="ce1">
            <text:p>from layout import GraphPan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yout</text:p>
          </table:table-cell>
          <table:table-cell office:value-type="string" table:style-name="ce1">
            <text:p>from layout import MakeHeader,MakeStudent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yout</text:p>
          </table:table-cell>
          <table:table-cell office:value-type="string" table:style-name="ce1">
            <text:p>from layout import open_antiprofil, TgenLay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yout</text:p>
          </table:table-cell>
          <table:table-cell office:value-type="string" table:style-name="ce1">
            <text:p>from layout import OpenCHDS, dolexlayout, StatLayout, WordCloudLayout, OpenCorpus, SimiLayout, SimiMatLayout, ProtoLayout, MatLayout, FreqLayout, Chi2Layout, LabbeLay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yout</text:p>
          </table:table-cell>
          <table:table-cell office:value-type="string" table:style-name="ce1">
            <text:p>from layout import OpenCHDS, PrintRappo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yout</text:p>
          </table:table-cell>
          <table:table-cell office:value-type="string" table:style-name="ce1">
            <text:p>from layout import PrintRappo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yout</text:p>
          </table:table-cell>
          <table:table-cell office:value-type="string" table:style-name="ce1">
            <text:p>from layout import SimiLay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e</text:p>
          </table:table-cell>
          <table:table-cell office:value-type="string" table:style-name="ce1">
            <text:p>from Liste import *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lex</text:p>
          </table:table-cell>
          <table:table-cell office:value-type="string" table:style-name="ce1">
            <text:p>from listlex import *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lex</text:p>
          </table:table-cell>
          <table:table-cell office:value-type="string" table:style-name="ce1">
            <text:p>from listlex import ListForSp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geclustergraph</text:p>
          </table:table-cell>
          <table:table-cell office:value-type="string" table:style-name="ce1">
            <text:p>from mergeclustergraph import MergeClusterGrap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oolib</text:p>
          </table:table-cell>
          <table:table-cell office:value-type="string" table:style-name="ce1">
            <text:p>import oooli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enanalyse</text:p>
          </table:table-cell>
          <table:table-cell office:value-type="string" table:style-name="ce1">
            <text:p>from openanalyse import OpenAnaly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tionAlceste</text:p>
          </table:table-cell>
          <table:table-cell office:value-type="string" table:style-name="ce1">
            <text:p>from OptionAlceste import OptionAl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tionAlceste</text:p>
          </table:table-cell>
          <table:table-cell office:value-type="string" table:style-name="ce1">
            <text:p>from OptionAlceste import OptionP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se_dmi</text:p>
          </table:table-cell>
          <table:table-cell office:value-type="string" table:style-name="ce1">
            <text:p>from parse_dmi import ImportD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se_europress</text:p>
          </table:table-cell>
          <table:table-cell office:value-type="string" table:style-name="ce1">
            <text:p>from parse_europress import ParseEurop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se_factiva_mail</text:p>
          </table:table-cell>
          <table:table-cell office:value-type="string" table:style-name="ce1">
            <text:p>from parse_factiva_mail import ParseFactivaMa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se_factiva_txt</text:p>
          </table:table-cell>
          <table:table-cell office:value-type="string" table:style-name="ce1">
            <text:p>from parse_factiva_txt import ParseFactivaPa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se_factiva_xml</text:p>
          </table:table-cell>
          <table:table-cell office:value-type="string" table:style-name="ce1">
            <text:p>from parse_factiva_xml import ImportFactiv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se_factiva_xml</text:p>
          </table:table-cell>
          <table:table-cell office:value-type="string" table:style-name="ce1">
            <text:p>from parse_factiva_xml import PrefImpo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barpl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barplot, ChronoChi2Script, ChronoPropScript, Chronogg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Labbe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MergeGraph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PrintR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PrintRScript, FreqMulti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PrintSimi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Proto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RchdQu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RchdTxt, ReinertTxtProf, TgenProfScript, ReDoProf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ReinertTxtProf, RPamT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TgenSpec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WordCloudR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RScript</text:p>
          </table:table-cell>
          <table:table-cell office:value-type="string" table:style-name="ce1">
            <text:p>from PrintRScript import write_afc_graph, print_simi3d, PrintSimi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file_segment</text:p>
          </table:table-cell>
          <table:table-cell office:value-type="string" table:style-name="ce1">
            <text:p>from profile_segment import ProfileSeg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file_segment</text:p>
          </table:table-cell>
          <table:table-cell office:value-type="string" table:style-name="ce1">
            <text:p>from profile_segment import ProfileSegment, ProfilTy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fList</text:p>
          </table:table-cell>
          <table:table-cell office:value-type="string" table:style-name="ce1">
            <text:p>from ProfList import *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fList</text:p>
          </table:table-cell>
          <table:table-cell office:value-type="string" table:style-name="ce1">
            <text:p>from ProfList import ProfListctrlPan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arch_list</text:p>
          </table:table-cell>
          <table:table-cell office:value-type="string" table:style-name="ce1">
            <text:p>from search_list import Search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arch_tools</text:p>
          </table:table-cell>
          <table:table-cell office:value-type="string" table:style-name="ce1">
            <text:p>from search_tools import SearchFr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eet</text:p>
          </table:table-cell>
          <table:table-cell office:value-type="string" table:style-name="ce1">
            <text:p>from sheet import MyShe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afcm</text:p>
          </table:table-cell>
          <table:table-cell office:value-type="string" table:style-name="ce1">
            <text:p>from tabafcm import DoAFC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chdalc</text:p>
          </table:table-cell>
          <table:table-cell office:value-type="string" table:style-name="ce1">
            <text:p>from tabchdalc import AnalyseQu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chddist</text:p>
          </table:table-cell>
          <table:table-cell office:value-type="string" table:style-name="ce1">
            <text:p>from tabchddist import ChdClu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chi2</text:p>
          </table:table-cell>
          <table:table-cell office:value-type="string" table:style-name="ce1">
            <text:p>from tabchi2 import ChiSqua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chi2mcnemar</text:p>
          </table:table-cell>
          <table:table-cell office:value-type="string" table:style-name="ce1">
            <text:p>from tabchi2mcnemar import McNem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frequence</text:p>
          </table:table-cell>
          <table:table-cell office:value-type="string" table:style-name="ce1">
            <text:p>from tabfrequence import Frequences, FreqMulti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leau</text:p>
          </table:table-cell>
          <table:table-cell office:value-type="string" table:style-name="ce1">
            <text:p>from tableau import copymatri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leau</text:p>
          </table:table-cell>
          <table:table-cell office:value-type="string" table:style-name="ce1">
            <text:p>from tableau import Tabl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leau</text:p>
          </table:table-cell>
          <table:table-cell office:value-type="string" table:style-name="ce1">
            <text:p>from tableau import Tableau, copymatri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rsimple</text:p>
          </table:table-cell>
          <table:table-cell office:value-type="string" table:style-name="ce1">
            <text:p>from tabrsimple import InputT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simi</text:p>
          </table:table-cell>
          <table:table-cell office:value-type="string" table:style-name="ce1">
            <text:p>from tabsimi import DoSi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splitvar</text:p>
          </table:table-cell>
          <table:table-cell office:value-type="string" table:style-name="ce1">
            <text:p>from tabsplitvar import SplitMatrixFromV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verges</text:p>
          </table:table-cell>
          <table:table-cell office:value-type="string" table:style-name="ce1">
            <text:p>from tabverges import Prototyp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aslexico</text:p>
          </table:table-cell>
          <table:table-cell office:value-type="string" table:style-name="ce1">
            <text:p>from textaslexico import Lex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aslexico</text:p>
          </table:table-cell>
          <table:table-cell office:value-type="string" table:style-name="ce1">
            <text:p>from textaslexico import TgenSp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labbe</text:p>
          </table:table-cell>
          <table:table-cell office:value-type="string" table:style-name="ce1">
            <text:p>from textlabbe import DistLabb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reinert</text:p>
          </table:table-cell>
          <table:table-cell office:value-type="string" table:style-name="ce1">
            <text:p>from textreinert import Reine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reinert</text:p>
          </table:table-cell>
          <table:table-cell office:value-type="string" table:style-name="ce1">
            <text:p>from textreinert import TgenPr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simi</text:p>
          </table:table-cell>
          <table:table-cell office:value-type="string" table:style-name="ce1">
            <text:p>from textsimi import *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simi</text:p>
          </table:table-cell>
          <table:table-cell office:value-type="string" table:style-name="ce1">
            <text:p>from textsimi import SimiTxt, SimiFromClu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stat</text:p>
          </table:table-cell>
          <table:table-cell office:value-type="string" table:style-name="ce1">
            <text:p>from textstat import St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wordcloud</text:p>
          </table:table-cell>
          <table:table-cell office:value-type="string" table:style-name="ce1">
            <text:p>from textwordcloud import WordCloud, ClusterClou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ols</text:p>
          </table:table-cell>
          <table:table-cell office:value-type="string" table:style-name="ce1">
            <text:p>from tools import Ex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ee</text:p>
          </table:table-cell>
          <table:table-cell office:value-type="string" table:style-name="ce1">
            <text:p>from tree import LeftTre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temspicker</text:p>
          </table:table-cell>
          <table:table-cell office:value-type="string" table:style-name="ce1">
            <text:p>from vitemspicker import VItemsPicker, EVT_IP_SELECTION_CHANGED, IP_SORT_CHOICES, IP_SORT_SELECTED, IP_REMOVE_FROM_CHOI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bexport</text:p>
          </table:table-cell>
          <table:table-cell office:value-type="string" table:style-name="ce1">
            <text:p>from webexport import WebExport</text:p>
          </table:table-cell>
          <table:table-cell table:number-columns-repeated="16382"/>
        </table:table-row>
        <table:table-row table:number-rows-repeated="1048396" table:style-name="ro1">
          <table:table-cell table:number-columns-repeated="16384"/>
        </table:table-row>
      </table:table>
      <table:database-ranges>
        <table:database-range table:target-range-address="Feuil1.A1:Feuil1.B65" table:contains-header="false">
          <table:sort>
            <table:sort-by table:field-number="0"/>
          </table:sort>
        </table:database-range>
        <table:database-range table:target-range-address="Feuil2.A1:Feuil2.B18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laurent merat</meta:initial-creator>
    <dc:creator>laurent merat</dc:creator>
    <meta:creation-date>2020-05-15T16:02:51Z</meta:creation-date>
    <dc:date>2020-05-15T16:38:22Z</dc:date>
  </office:meta>
</office:document-meta>
</file>